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tiff" manifest:full-path="Pictures/10000000000000330000005FD4948B99.tif"/>
  <manifest:file-entry manifest:media-type="image/tiff" manifest:full-path="Pictures/10000000000000330000005F3E18E38D.tif"/>
  <manifest:file-entry manifest:media-type="image/tiff" manifest:full-path="Pictures/10000000000000330000005F058DCBAB.tif"/>
  <manifest:file-entry manifest:media-type="image/tiff" manifest:full-path="Pictures/10000000000000330000005F54C3673F.tif"/>
  <manifest:file-entry manifest:media-type="image/tiff" manifest:full-path="Pictures/10000000000000330000005FB53B6FD1.tif"/>
  <manifest:file-entry manifest:media-type="image/tiff" manifest:full-path="Pictures/10000000000000330000005F70F3397E.tif"/>
  <manifest:file-entry manifest:media-type="image/tiff" manifest:full-path="Pictures/10000000000000330000005F3477183D.tif"/>
  <manifest:file-entry manifest:media-type="image/tiff" manifest:full-path="Pictures/10000000000000330000005F0E6B93B6.tif"/>
  <manifest:file-entry manifest:media-type="image/tiff" manifest:full-path="Pictures/10000000000000330000005FBA704493.tif"/>
  <manifest:file-entry manifest:media-type="image/tiff" manifest:full-path="Pictures/10000000000000330000005F91DBB709.tif"/>
  <manifest:file-entry manifest:media-type="image/png" manifest:full-path="Pictures/10000000000000330000005FCE7AA2E8.png"/>
  <manifest:file-entry manifest:media-type="image/tiff" manifest:full-path="Pictures/10000000000000330000005FDA279EC8.tif"/>
  <manifest:file-entry manifest:media-type="image/tiff" manifest:full-path="Pictures/10000000000000330000005FE22D1C60.tif"/>
  <manifest:file-entry manifest:media-type="image/tiff" manifest:full-path="Pictures/10000000000000330000005FED46AFD2.tif"/>
  <manifest:file-entry manifest:media-type="image/tiff" manifest:full-path="Pictures/10000000000000330000005F03835E2B.t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title">
      <style:graphic-properties fo:min-height="3.681cm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1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1-subtitle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 style:font-independent-line-spacing="true"/>
      <style:text-properties fo:font-size="18pt" fo:hyphenate="false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line-height="90%" fo:text-align="start" style:punctuation-wrap="hanging" style:writing-mode="lr-tb" style:font-independent-line-spacing="true"/>
      <style:text-properties fo:font-size="32pt" style:font-size-asian="32pt" style:font-size-complex="32pt" fo:hyphenate="false"/>
    </style:style>
    <style:style style:name="P8" style:family="paragraph">
      <style:paragraph-properties fo:margin-top="0cm" fo:margin-bottom="0cm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family="Arial" style:font-family-generic="swiss" style:font-pitch="variable" fo:font-size="36pt" style:font-size-asian="36pt" style:font-size-complex="36pt"/>
    </style:style>
    <style:style style:name="T4" style:family="text">
      <style:text-properties fo:color="#000000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ignal No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Subtitle 2" presentation:style-name="pr3" draw:text-style-name="P3" draw:layer="layout" svg:width="26.162cm" svg:height="13.462cm" svg:x="7.112cm" svg:y="4.318cm">
          <draw:text-box>
            <text:p text:style-name="P1"><text:span text:style-name="T1">The software defines a set of aspects. Here is the starting list:</text:span></text:p>
            <text:list text:style-name="L1">
              <text:list-item>
                <text:p text:style-name="P1"><text:span text:style-name="T2">Stop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d</text:span></text:p>
              </text:list-item>
              <text:list-item>
                <text:p text:style-name="P1"><text:span text:style-name="T2">Approach </text:span><text:span text:style-name="T2"><text:tab/></text:span><text:span text:style-name="T2"><text:tab/></text:span><text:span text:style-name="T2"><text:tab/></text:span><text:span text:style-name="T2"><text:tab/></text:span><text:span text:style-name="T2">yellow</text:span></text:p>
              </text:list-item>
              <text:list-item>
                <text:p text:style-name="P1"><text:span text:style-name="T2">Advance </text:span><text:span text:style-name="T2"><text:tab/></text:span><text:span text:style-name="T2"><text:tab/></text:span><text:span text:style-name="T2"><text:tab/></text:span><text:span text:style-name="T2"><text:tab/></text:span><text:span text:style-name="T2">flash yellow</text:span></text:p>
              </text:list-item>
              <text:list-item>
                <text:p text:style-name="P1"><text:span text:style-name="T2">Clear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reen</text:span></text:p>
              </text:list-item>
              <text:list-item>
                <text:p text:style-name="P1"><text:span text:style-name="T2">Diverge Approach </text:span><text:span text:style-name="T2"><text:tab/></text:span><text:span text:style-name="T2"><text:tab/></text:span><text:span text:style-name="T2">red + yellow</text:span></text:p>
              </text:list-item>
              <text:list-item>
                <text:p text:style-name="P1"><text:span text:style-name="T2">Diverge Advance </text:span><text:span text:style-name="T2"><text:tab/></text:span><text:span text:style-name="T2"><text:tab/></text:span><text:span text:style-name="T2"><text:tab/></text:span><text:span text:style-name="T2">red + flash yellow</text:span></text:p>
              </text:list-item>
              <text:list-item>
                <text:p text:style-name="P1"><text:span text:style-name="T2">Diverge Clear</text:span><text:span text:style-name="T2"><text:tab/></text:span><text:span text:style-name="T2"><text:tab/></text:span><text:span text:style-name="T2"><text:tab/></text:span><text:span text:style-name="T2"><text:tab/></text:span><text:span text:style-name="T2">red + green</text:span></text:p>
              </text:list-item>
              <text:list-item>
                <text:p text:style-name="P1"><text:span text:style-name="T2">Interlocking Approach</text:span><text:span text:style-name="T2"><text:tab/></text:span><text:span text:style-name="T2"><text:tab/></text:span><text:span text:style-name="T2">yellow + flash red</text:span></text:p>
              </text:list-item>
              <text:list-item>
                <text:p text:style-name="P1"><text:span text:style-name="T2">Interlocking Advance</text:span><text:span text:style-name="T2"><text:tab/></text:span><text:span text:style-name="T2"><text:tab/></text:span><text:span text:style-name="T2">flash yellow + flash red</text:span></text:p>
              </text:list-item>
              <text:list-item>
                <text:p text:style-name="P1"><text:span text:style-name="T2">Interlocking Clear</text:span><text:span text:style-name="T2"><text:tab/></text:span><text:span text:style-name="T2"><text:tab/></text:span><text:span text:style-name="T2"><text:tab/></text:span><text:span text:style-name="T2">flash red + green</text:span></text:p>
              </text:list-item>
              <text:list-item>
                <text:p text:style-name="P1"><text:span text:style-name="T2">Stop &amp; Go</text:span><text:span text:style-name="T2"><text:tab/></text:span><text:span text:style-name="T2"><text:tab/></text:span><text:span text:style-name="T2"><text:tab/></text:span><text:span text:style-name="T2"><text:tab/></text:span><text:span text:style-name="T2">alternate red + yellow</text:span></text:p>
              </text:list-item>
              <text:list-item>
                <text:p text:style-name="P1"><text:span text:style-name="T2">Dark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off</text:span></text:p>
              </text:list-item>
              <text:list-item>
                <text:p text:style-name="P1"><text:span text:style-name="T2">Tes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flash</text:span></text:p>
              </text:list-item>
            </text:list>
          </draw:text-box>
        </draw:frame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spect overview</text:span></text:p>
          </draw:text-box>
        </draw:frame>
        <draw:frame draw:style-name="gr2" draw:text-style-name="P5" draw:layer="layout" svg:width="4.318cm" svg:height="6.069cm" svg:x="2.286cm" svg:y="6.123cm">
          <draw:image xlink:href="Pictures/10000000000000330000005F0E6B93B6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spect overview</text:span></text:p>
          </draw:text-box>
        </draw:frame>
        <draw:frame draw:name="Subtitle 2" presentation:style-name="pr6" draw:text-style-name="P7" draw:layer="layout" svg:width="25.908cm" svg:height="13.462cm" svg:x="6.35cm" svg:y="4.318cm">
          <draw:text-box>
            <text:p text:style-name="P1"><text:span text:style-name="T4">The example head here shows the color options in the following diagrams.</text:span></text:p>
            <text:p text:style-name="P1"><text:span text:style-name="T4">Here Red is lit.</text:span></text:p>
            <text:p text:style-name="P1"><text:span text:style-name="T4">Yellow is flashing.</text:span></text:p>
            <text:p text:style-name="P1"><text:span text:style-name="T4">Green is off.</text:span></text:p>
            <text:p text:style-name="P1"><text:span text:style-name="T4">Any color may be Lit, flashing or off as defined by the aspect.</text:span></text:p>
          </draw:text-box>
        </draw:frame>
        <draw:frame draw:style-name="gr2" draw:text-style-name="P5" draw:layer="layout" svg:width="3.81cm" svg:height="5.842cm" svg:x="1.778cm" svg:y="5.334cm">
          <draw:image xlink:href="Pictures/10000000000000330000005FCE7AA2E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spect Terminology</text:span></text:p>
          </draw:text-box>
        </draw:frame>
        <draw:frame draw:name="Subtitle 2" presentation:style-name="pr7" draw:text-style-name="P7" draw:layer="layout" svg:width="25.908cm" svg:height="13.462cm" svg:x="6.35cm" svg:y="4.318cm">
          <draw:text-box>
            <text:p text:style-name="P1"><text:span text:style-name="T4">There are three types of signals, Mainline, Divergent, and Interlocking.</text:span></text:p>
            <text:list text:style-name="L1">
              <text:list-item>
                <text:p text:style-name="P1"><text:span text:style-name="T4">Mainline aspects show the occupancy of the mainline routes. These are shown with single light.</text:span></text:p>
              </text:list-item>
              <text:list-item>
                <text:p text:style-name="P1"><text:span text:style-name="T4">Divergent aspects show that a turnout ahead Is set to either enter or leave the mainline. These have a steady red plus another light.</text:span></text:p>
              </text:list-item>
              <text:list-item>
                <text:p text:style-name="P1"><text:span text:style-name="T4">Interlocking aspects show that more than one turnout will be traversed in getting to the next block. These have a flashing red plus another light.</text:span></text:p>
              </text:list-item>
            </text:list>
            <text:p text:style-name="P1"><text:span text:style-name="T4">In all cases, a single red means stop.</text:span></text:p>
          </draw:text-box>
        </draw:frame>
        <draw:frame draw:style-name="gr2" draw:text-style-name="P5" draw:layer="layout" svg:width="3.81cm" svg:height="5.842cm" svg:x="1.778cm" svg:y="5.334cm">
          <draw:image xlink:href="Pictures/10000000000000330000005FCE7AA2E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Two Head signals</text:span></text:p>
          </draw:text-box>
        </draw:frame>
        <draw:frame draw:name="Subtitle 2" presentation:style-name="pr8" draw:text-style-name="P3" draw:layer="layout" svg:width="20.573cm" svg:height="13.462cm" svg:x="9.652cm" svg:y="4.318cm">
          <draw:text-box>
            <text:p text:style-name="P1"><text:span text:style-name="T1">In some places signals with more than one head are used. </text:span></text:p>
            <text:p text:style-name="P1"><text:span text:style-name="T1">In these cases, the top head is for mainline blocks, the bottom is for the siding. <text:s/>The bottom head will show a diverging aspect, as a turnout is needed to access the mainline.</text:span></text:p>
          </draw:text-box>
        </draw:frame>
        <draw:frame draw:style-name="gr2" draw:text-style-name="P5" draw:layer="layout" svg:width="1.348cm" svg:height="2.513cm" svg:x="3.478cm" svg:y="4.853cm">
          <draw:image xlink:href="Pictures/10000000000000330000005FB53B6FD1.tif" xlink:type="simple" xlink:show="embed" xlink:actuate="onLoad">
            <text:p/>
          </draw:image>
        </draw:frame>
        <draw:frame draw:style-name="gr2" draw:text-style-name="P5" draw:layer="layout" svg:width="1.348cm" svg:height="2.513cm" svg:x="3.478cm" svg:y="7.62cm">
          <draw:image xlink:href="Pictures/10000000000000330000005F54C3673F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Three Head signals</text:span></text:p>
          </draw:text-box>
        </draw:frame>
        <draw:frame draw:name="Subtitle 2" presentation:style-name="pr9" draw:text-style-name="P3" draw:layer="layout" svg:width="20.573cm" svg:height="13.462cm" svg:x="9.652cm" svg:y="4.318cm">
          <draw:text-box>
            <text:p text:style-name="P1"><text:span text:style-name="T1">Three head signals are used where a route goes to or from <text:s/>three tracks to one. Mostly at the yard access points near the City (Tables 10,11,12). These will always show Interlocking aspects (Flashing Red) when the route is not to a mainline.</text:span></text:p>
          </draw:text-box>
        </draw:frame>
        <draw:frame draw:style-name="gr2" draw:text-style-name="P5" draw:layer="layout" svg:width="1.348cm" svg:height="2.513cm" svg:x="3.302cm" svg:y="5.361cm">
          <draw:image xlink:href="Pictures/10000000000000330000005F91DBB709.tif" xlink:type="simple" xlink:show="embed" xlink:actuate="onLoad">
            <text:p/>
          </draw:image>
        </draw:frame>
        <draw:frame draw:style-name="gr2" draw:text-style-name="P5" draw:layer="layout" svg:width="1.348cm" svg:height="2.513cm" svg:x="3.214cm" svg:y="8.246cm">
          <draw:image xlink:href="Pictures/10000000000000330000005FB53B6FD1.tif" xlink:type="simple" xlink:show="embed" xlink:actuate="onLoad">
            <text:p/>
          </draw:image>
        </draw:frame>
        <draw:frame draw:style-name="gr2" draw:text-style-name="P5" draw:layer="layout" svg:width="1.348cm" svg:height="2.513cm" svg:x="3.224cm" svg:y="11.203cm">
          <draw:image xlink:href="Pictures/10000000000000330000005FB53B6FD1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Dark</text:span></text:p>
          </draw:text-box>
        </draw:frame>
        <draw:frame draw:name="Subtitle 2" presentation:style-name="pr10" draw:text-style-name="P3" draw:layer="layout" svg:width="20.573cm" svg:height="13.462cm" svg:x="9.652cm" svg:y="4.318cm">
          <draw:text-box>
            <text:p text:style-name="P1"><text:span text:style-name="T1">Dark</text:span></text:p>
            <text:p text:style-name="P1"><text:span text:style-name="T1">An unlit head is called Dark.</text:span></text:p>
            <text:p text:style-name="P1"><text:span text:style-name="T1">In most cases, this is an error.</text:span></text:p>
            <text:p text:style-name="P1"><text:span text:style-name="T1">In general, Clear should be the default. Notify the layout team if you see a dark signal.</text:span></text:p>
            <text:p text:style-name="P1"><text:span text:style-name="T1">There <text:s/>may be special rules published later to cover Dark.</text:span></text:p>
          </draw:text-box>
        </draw:frame>
        <draw:frame draw:style-name="gr2" draw:text-style-name="P5" draw:layer="layout" svg:width="1.348cm" svg:height="2.513cm" svg:x="3.302cm" svg:y="5.588cm">
          <draw:image xlink:href="Pictures/10000000000000330000005F03835E2B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Stop</text:span></text:p>
          </draw:text-box>
        </draw:frame>
        <draw:frame draw:name="Subtitle 2" presentation:style-name="pr11" draw:text-style-name="P3" draw:layer="layout" svg:width="20.573cm" svg:height="13.462cm" svg:x="9.652cm" svg:y="4.318cm">
          <draw:text-box>
            <text:p text:style-name="P1"><text:span text:style-name="T1">Stop</text:span></text:p>
            <text:p text:style-name="P1"><text:span text:style-name="T1">Red light, stop. No way forward is clear of obstructions or track is set against your train.</text:span></text:p>
            <text:p text:style-name="P1"><text:span text:style-name="T1">If you pass a red light, bad things will happen.</text:span></text:p>
          </draw:text-box>
        </draw:frame>
        <draw:frame draw:style-name="gr2" draw:text-style-name="P5" draw:layer="layout" svg:width="1.348cm" svg:height="2.513cm" svg:x="4.24cm" svg:y="4.853cm">
          <draw:image xlink:href="Pictures/10000000000000330000005FB53B6FD1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pproach</text:span></text:p>
          </draw:text-box>
        </draw:frame>
        <draw:frame draw:name="Subtitle 2" presentation:style-name="pr12" draw:text-style-name="P3" draw:layer="layout" svg:width="20.573cm" svg:height="13.462cm" svg:x="9.652cm" svg:y="4.318cm">
          <draw:text-box>
            <text:p text:style-name="P1"><text:span text:style-name="T1">Approach</text:span></text:p>
            <text:p text:style-name="P1"><text:span text:style-name="T1">Yellow light, slow. </text:span></text:p>
            <text:p text:style-name="P1"><text:span text:style-name="T1">Next Light is Red.</text:span></text:p>
            <text:p text:style-name="P1"><text:span text:style-name="T1">You are have been warned!</text:span></text:p>
          </draw:text-box>
        </draw:frame>
        <draw:frame draw:style-name="gr2" draw:text-style-name="P5" draw:layer="layout" svg:width="1.348cm" svg:height="2.513cm" svg:x="4.064cm" svg:y="5.842cm">
          <draw:image xlink:href="Pictures/10000000000000330000005FED46AFD2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Advance</text:span></text:p>
          </draw:text-box>
        </draw:frame>
        <draw:frame draw:name="Subtitle 2" presentation:style-name="pr13" draw:text-style-name="P3" draw:layer="layout" svg:width="20.573cm" svg:height="13.462cm" svg:x="9.652cm" svg:y="4.318cm">
          <draw:text-box>
            <text:p text:style-name="P1"><text:span text:style-name="T1">Advance</text:span></text:p>
            <text:p text:style-name="P1"><text:span text:style-name="T1">Next light Approach.</text:span></text:p>
            <text:p text:style-name="P1"><text:span text:style-name="T1">Two blocks to a Stop. Time to start slowing down.</text:span></text:p>
            <text:p text:style-name="P1"><text:span text:style-name="T1"/></text:p>
          </draw:text-box>
        </draw:frame>
        <draw:frame draw:style-name="gr2" draw:text-style-name="P5" draw:layer="layout" svg:width="1.348cm" svg:height="2.513cm" svg:x="3.81cm" svg:y="4.853cm">
          <draw:image xlink:href="Pictures/10000000000000330000005F3477183D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Clear</text:span></text:p>
          </draw:text-box>
        </draw:frame>
        <draw:frame draw:name="Subtitle 2" presentation:style-name="pr14" draw:text-style-name="P3" draw:layer="layout" svg:width="20.573cm" svg:height="13.462cm" svg:x="9.652cm" svg:y="4.318cm">
          <draw:text-box>
            <text:p text:style-name="P1"><text:span text:style-name="T1">Clear</text:span></text:p>
            <text:p text:style-name="P1"><text:span text:style-name="T1">Go.</text:span></text:p>
            <text:p text:style-name="P1"><text:span text:style-name="T1">No obstructions, clear track ahead.</text:span></text:p>
            <text:p text:style-name="P1"><text:span text:style-name="T1">Also known as HighBall or go like hell!!</text:span></text:p>
          </draw:text-box>
        </draw:frame>
        <draw:frame draw:style-name="gr2" draw:text-style-name="P5" draw:layer="layout" svg:width="1.348cm" svg:height="2.513cm" svg:x="3.986cm" svg:y="5.588cm">
          <draw:image xlink:href="Pictures/10000000000000330000005FE22D1C60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><text:span text:style-name="T3">Divergent Approach</text:span></text:p>
          </draw:text-box>
        </draw:frame>
        <draw:frame draw:name="Subtitle 2" presentation:style-name="pr15" draw:text-style-name="P3" draw:layer="layout" svg:width="20.573cm" svg:height="13.462cm" svg:x="9.652cm" svg:y="4.318cm">
          <draw:text-box>
            <text:p text:style-name="P1"><text:span text:style-name="T5">Divergent Approach</text:span></text:p>
            <text:p text:style-name="P1"><text:span text:style-name="T1">Next light is stop.</text:span></text:p>
            <text:p text:style-name="P1"><text:span text:style-name="T1">Proceed slowly.</text:span></text:p>
            <text:p text:style-name="P1"><text:span text:style-name="T1">The track ahead includes a turnout. </text:span></text:p>
            <text:p text:style-name="P1"><text:span text:style-name="T1">The turnout leads to an occupied track. </text:span></text:p>
          </draw:text-box>
        </draw:frame>
        <draw:frame draw:style-name="gr2" draw:text-style-name="P5" draw:layer="layout" svg:width="1.348cm" svg:height="2.513cm" svg:x="3.478cm" svg:y="5.588cm">
          <draw:image xlink:href="Pictures/10000000000000330000005F058DCBAB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Divergent Advance</text:span></text:p>
          </draw:text-box>
        </draw:frame>
        <draw:frame draw:name="Subtitle 2" presentation:style-name="pr16" draw:text-style-name="P3" draw:layer="layout" svg:width="20.573cm" svg:height="13.462cm" svg:x="9.652cm" svg:y="4.318cm">
          <draw:text-box>
            <text:p text:style-name="P1"><text:span text:style-name="T5">Divergent Advance</text:span></text:p>
            <text:p text:style-name="P1"><text:span text:style-name="T1">First you go though a turnout, then you get a Yellow light. </text:span></text:p>
            <text:p text:style-name="P1"><text:span text:style-name="T1">The turnout ahead will take you to Yellow, then Red.</text:span></text:p>
            <text:p text:style-name="P1"><text:span text:style-name="T1">Reduce speed for the turnout as needed.</text:span></text:p>
            <text:p text:style-name="P1"><text:span text:style-name="T1"/></text:p>
          </draw:text-box>
        </draw:frame>
        <draw:frame draw:style-name="gr2" draw:text-style-name="P5" draw:layer="layout" svg:width="1.348cm" svg:height="2.513cm" svg:x="4.064cm" svg:y="5.334cm">
          <draw:image xlink:href="Pictures/10000000000000330000005F54C3673F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Divergent Clear</text:span></text:p>
          </draw:text-box>
        </draw:frame>
        <draw:frame draw:name="Subtitle 2" presentation:style-name="pr17" draw:text-style-name="P3" draw:layer="layout" svg:width="20.573cm" svg:height="13.462cm" svg:x="9.652cm" svg:y="4.318cm">
          <draw:text-box>
            <text:p text:style-name="P1"><text:span text:style-name="T5">Divergent Clear</text:span></text:p>
            <text:p text:style-name="P1"><text:span text:style-name="T1">Clear with Turnout.</text:span></text:p>
            <text:p text:style-name="P1"><text:span text:style-name="T1">The Blocks ahead are clear, but include a Turnout. (Not mainline)</text:span></text:p>
            <text:p text:style-name="P1"><text:span text:style-name="T1">Slow to turnout speed as needed.</text:span></text:p>
          </draw:text-box>
        </draw:frame>
        <draw:frame draw:style-name="gr2" draw:text-style-name="P5" draw:layer="layout" svg:width="1.348cm" svg:height="2.513cm" svg:x="4.24cm" svg:y="5.107cm">
          <draw:image xlink:href="Pictures/10000000000000330000005F3E18E38D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Interlocking Approach</text:span></text:p>
          </draw:text-box>
        </draw:frame>
        <draw:frame draw:name="Subtitle 2" presentation:style-name="pr18" draw:text-style-name="P3" draw:layer="layout" svg:width="20.573cm" svg:height="13.462cm" svg:x="9.652cm" svg:y="4.318cm">
          <draw:text-box>
            <text:p text:style-name="P1"><text:span text:style-name="T5">Interlocking Approach</text:span></text:p>
            <text:p text:style-name="P1"><text:span text:style-name="T1">The next block is stop.</text:span></text:p>
            <text:p text:style-name="P1"><text:span text:style-name="T1">Also there are more than one turnouts traversed to get to that block. Proceed with caution.</text:span></text:p>
          </draw:text-box>
        </draw:frame>
        <draw:frame draw:style-name="gr2" draw:text-style-name="P5" draw:layer="layout" svg:width="2.872cm" svg:height="4.291cm" svg:x="3.986cm" svg:y="4.853cm">
          <draw:image xlink:href="Pictures/10000000000000330000005F91DBB709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Interlocking Advance</text:span></text:p>
          </draw:text-box>
        </draw:frame>
        <draw:frame draw:name="Subtitle 2" presentation:style-name="pr19" draw:text-style-name="P3" draw:layer="layout" svg:width="20.573cm" svg:height="13.462cm" svg:x="9.652cm" svg:y="4.318cm">
          <draw:text-box>
            <text:p text:style-name="P1"><text:span text:style-name="T5">Interlocking Advance</text:span></text:p>
            <text:p text:style-name="P1"><text:span text:style-name="T1">Stop is two blocks ahead, and you will traverse several turnouts to get there.</text:span></text:p>
            <text:p text:style-name="P1"><text:span text:style-name="T1">Be alert, make sure the route is correct, and go slow into the trackwork ahead.</text:span></text:p>
          </draw:text-box>
        </draw:frame>
        <draw:frame draw:style-name="gr2" draw:text-style-name="P5" draw:layer="layout" svg:width="2.103cm" svg:height="4.357cm" svg:x="3.302cm" svg:y="4.318cm">
          <draw:image xlink:href="Pictures/10000000000000330000005FD4948B99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Interlocking Clear</text:span></text:p>
          </draw:text-box>
        </draw:frame>
        <draw:frame draw:name="Subtitle 2" presentation:style-name="pr20" draw:text-style-name="P3" draw:layer="layout" svg:width="20.573cm" svg:height="13.462cm" svg:x="9.652cm" svg:y="4.318cm">
          <draw:text-box>
            <text:p text:style-name="P1"><text:span text:style-name="T5">Interlocking Clear</text:span></text:p>
            <text:p text:style-name="P1"><text:span text:style-name="T1">Clear with multiple turnouts and crossings.</text:span></text:p>
            <text:p text:style-name="P1"><text:span text:style-name="T1">The Blocks ahead are clear, but include complex trackwork. </text:span></text:p>
            <text:p text:style-name="P1"><text:span text:style-name="T1">Slow speed is recommended</text:span></text:p>
          </draw:text-box>
        </draw:frame>
        <draw:frame draw:style-name="gr2" draw:text-style-name="P5" draw:layer="layout" svg:width="2.949cm" svg:height="4.294cm" svg:x="3.147cm" svg:y="4.596cm">
          <draw:image xlink:href="Pictures/10000000000000330000005FDA279EC8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Stop and Go</text:span></text:p>
          </draw:text-box>
        </draw:frame>
        <draw:frame draw:name="Subtitle 2" presentation:style-name="pr21" draw:text-style-name="P3" draw:layer="layout" svg:width="20.573cm" svg:height="13.462cm" svg:x="9.652cm" svg:y="4.318cm">
          <draw:text-box>
            <text:p text:style-name="P1"><text:span text:style-name="T5">Stop &amp; Go</text:span></text:p>
            <text:p text:style-name="P1"><text:span text:style-name="T1">Stop, then proceed slowly.</text:span></text:p>
            <text:p text:style-name="P1"><text:span text:style-name="T1">Note that read and Yellow alternate. </text:span></text:p>
            <text:p text:style-name="P1"><text:span text:style-name="T1">See special rules for this aspect (TBD)</text:span></text:p>
          </draw:text-box>
        </draw:frame>
        <draw:frame draw:style-name="gr2" draw:text-style-name="P5" draw:layer="layout" svg:width="3.048cm" svg:height="4.545cm" svg:x="3.81cm" svg:y="5.361cm">
          <draw:image xlink:href="Pictures/10000000000000330000005FBA704493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draw:frame presentation:style-name="pr4" draw:text-style-name="P4" draw:layer="layout" svg:width="29.209cm" svg:height="3.681cm" svg:x="2.328cm" svg:y="1.014cm" presentation:class="title" presentation:user-transformed="true">
          <draw:text-box>
            <text:p text:style-name="P8"><text:span text:style-name="T5">Test</text:span></text:p>
          </draw:text-box>
        </draw:frame>
        <draw:frame draw:name="Subtitle 2" presentation:style-name="pr22" draw:text-style-name="P3" draw:layer="layout" svg:width="20.573cm" svg:height="13.462cm" svg:x="9.652cm" svg:y="4.318cm">
          <draw:text-box>
            <text:p text:style-name="P1"><text:span text:style-name="T1">All lights flash with test. </text:span></text:p>
            <text:p text:style-name="P1"><text:span text:style-name="T1">All signals should do this on power up for a few seconds. </text:span></text:p>
            <text:p text:style-name="P1"><text:span text:style-name="T1">This is a diagnostic aspect. Report this to layout support if you see this more than a few cycles after power on</text:span></text:p>
          </draw:text-box>
        </draw:frame>
        <draw:frame draw:style-name="gr2" draw:text-style-name="P5" draw:layer="layout" svg:width="1.348cm" svg:height="2.513cm" svg:x="3.224cm" svg:y="5.08cm">
          <draw:image xlink:href="Pictures/10000000000000330000005F70F3397E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2-06-16">6/16/22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2-06-16">6/16/22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6-16T12:04:11.11</dc:date>
    <dc:creator>Thomas Stephens</dc:creator>
    <meta:generator>OpenOffice/4.1.11$Win32 OpenOffice.org_project/4111m1$Build-9808</meta:generator>
    <meta:editing-duration>PT9H25M1S</meta:editing-duration>
    <meta:editing-cycles>11</meta:editing-cycles>
    <meta:document-statistic meta:object-count="128"/>
  </office:meta>
</office:document-meta>
</file>